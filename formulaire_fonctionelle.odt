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loext:opacity="100%" officeooo:rsid="0013bcbe" officeooo:paragraph-rsid="0013bcbe"/>
    </style:style>
    <style:style style:name="P2" style:family="paragraph" style:parent-style-name="Standard">
      <style:text-properties fo:color="#000000" loext:opacity="100%" officeooo:rsid="0013bcbe" officeooo:paragraph-rsid="0013bcbe"/>
    </style:style>
    <style:style style:name="P3" style:family="paragraph" style:parent-style-name="Standard">
      <style:text-properties fo:color="#000000" loext:opacity="100%" officeooo:rsid="0013bcbe" officeooo:paragraph-rsid="0015764c"/>
    </style:style>
    <style:style style:name="P4" style:family="paragraph" style:parent-style-name="Standard">
      <style:text-properties fo:color="#000000" loext:opacity="100%" officeooo:rsid="0015764c" officeooo:paragraph-rsid="0015764c"/>
    </style:style>
    <style:style style:name="T1" style:family="text">
      <style:text-properties officeooo:rsid="001576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IRE FONCTIONNELLE DE RECIPEASY</text:p>
      <text:p text:style-name="P1"/>
      <text:p text:style-name="P1"/>
      <text:p text:style-name="P1"/>
      <text:p text:style-name="P1"/>
      <text:p text:style-name="P2">Recipeasy est une application a destination de tous et pouvant se montrer souvent tres utile au quotidien. En effet, apres une longue journée de travail, réfléchir a quoi faire a manger le soir peut-être de trop. Alors nous avons pensé a vous avec recipeasy.</text:p>
      <text:p text:style-name="P2"/>
      <text:p text:style-name="P2">Le principe est simple, il vous suffit de rentrer tout d’abord le nombre d’ingrédients que vous avez et que vous souhaitez utiliser pour votre recette. Ceci constitue donc la première étape de notre projet.</text:p>
      <text:p text:style-name="P2"/>
      <text:p text:style-name="P3">La seconde étape est de savoir quels aliments vous possédez. Par soucis de compexité, nous avons décidé de nous limiter <text:span text:style-name="T1">a une cinquantaine d’ingrédients. Pour choisir les ingrédients que vous possédez, il vous suffira de saisir dans la console le numéro present devant l’aliment désiré.</text:span></text:p>
      <text:p text:style-name="P3"/>
      <text:p text:style-name="P3"><text:span text:style-name="T1">Une fois tout vos aliments saisis, un certain nombre de recettes contenant la totalité ou une grande partie de vos aliments saisis vont être proposé. Seulement des noms de recette seront dans un premier temps proposé.</text:span></text:p>
      <text:p text:style-name="P3"/>
      <text:p text:style-name="P4">Il vous suffira par la suite de rentrer le numéro présent devant les recette qui correspond a une recette que vous souhaitez essayer.</text:p>
      <text:p text:style-name="P4"/>
      <text:p text:style-name="P4">Apres avoir fait ca, la recette s’affiche completement et vous pouvez ensuite taper un autre numéro pour choisir une autre recette.</text:p>
      <text:p text:style-name="P4"/>
      <text:p text:style-name="P4">Une fois que vous avez terminé d’utiliser l’application, saisissez « 100 » et le processus prendra f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1T22:15:30.651551700</meta:creation-date>
    <dc:date>2026-05-21T22:41:29.978598300</dc:date>
    <meta:editing-duration>PT15M47S</meta:editing-duration>
    <meta:editing-cycles>1</meta:editing-cycles>
    <meta:document-statistic meta:table-count="0" meta:image-count="0" meta:object-count="0" meta:page-count="1" meta:paragraph-count="8" meta:word-count="224" meta:character-count="1371" meta:non-whitespace-character-count="1155"/>
    <meta:generator>LibreOffice/25.8.6.2$Windows_X86_64 LibreOffice_project/b4b39682cd9868fa725bc664aff94278d315bd04</meta:generator>
  </office:meta>
</office:document-meta>
</file>