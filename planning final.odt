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ee5bc" officeooo:paragraph-rsid="001ee5bc"/>
    </style:style>
    <style:style style:name="P2" style:family="paragraph" style:parent-style-name="Standard">
      <style:text-properties style:text-underline-style="none" officeooo:rsid="001ee5bc" officeooo:paragraph-rsid="001ee5bc"/>
    </style:style>
    <style:style style:name="P3" style:family="paragraph" style:parent-style-name="Standard">
      <style:text-properties officeooo:rsid="001ee5bc" officeooo:paragraph-rsid="001ee5bc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partition des taches pour le projet</text:p>
      <text:p text:style-name="P1"/>
      <text:p text:style-name="P2">Base de donnée : 7 bases de données ont été nécessaires avant d’avoir celle que nous avons aujourd’hui grâce a Julien . La création de ces bases de données s’étend du mercredi 1<text:span text:style-name="T1">er</text:span> avril au 16 mai. L’utilisation de l’IA a été requise pour faciliter le script (beaucoup de requêtes répétitives) ainsi que pour avoir des recettes et aliments cohérents.</text:p>
      <text:p text:style-name="P2"/>
      <text:p text:style-name="P2"/>
      <text:p text:style-name="P2">Les différentes classes : les différentes classes ont été réalisés durant la dernière semaine (du 18 au 22 mai)</text:p>
      <text:p text:style-name="P2"/>
      <text:p text:style-name="P2">Notre main a été réalisé durant tout un mois où nous avons tout d’abord essayer de comprendre le fonctionnement de la liaison entre la classe main et la base de données . La suite a principalement été réalisé par julien avec mon aide (Jules Rivals) cette aide a du être a distance et en appel à cause d’un problème d’ordinateur très amoindri.</text:p>
      <text:p text:style-name="P2"/>
      <text:p text:style-name="P2">Durant ce temps là, Loan a également essayer de réaliser un code HTML pour que nous puissions avoir une interface pour notre application mais malheureusement pour divers soucis de compatibilité avec notre code cette interface a du être abandonnée. <text:s text:c="2"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7T17:10:28.019282900</meta:creation-date>
    <dc:date>2026-05-17T21:50:38.290581400</dc:date>
    <meta:editing-duration>PT4H29M7S</meta:editing-duration>
    <meta:editing-cycles>1</meta:editing-cycles>
    <meta:document-statistic meta:table-count="0" meta:image-count="0" meta:object-count="0" meta:page-count="1" meta:paragraph-count="5" meta:word-count="186" meta:character-count="1089" meta:non-whitespace-character-count="905"/>
    <meta:generator>LibreOffice/25.8.5.2$Windows_X86_64 LibreOffice_project/9c8b85f387cc00a89945a79c9e6239f32e450ac2</meta:generator>
  </office:meta>
</office:document-meta>
</file>