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36pt" officeooo:rsid="0013dbb3" officeooo:paragraph-rsid="0013dbb3" style:font-size-asian="36pt" style:font-size-complex="36pt"/>
    </style:style>
    <style:style style:name="P2" style:family="paragraph" style:parent-style-name="Standard">
      <style:text-properties fo:font-size="12pt" officeooo:rsid="0013dbb3" officeooo:paragraph-rsid="0013dbb3" style:font-size-asian="12pt" style:font-size-complex="12pt"/>
    </style:style>
    <style:style style:name="P3" style:family="paragraph" style:parent-style-name="Standard">
      <style:text-properties fo:color="#ff0000" loext:opacity="100%" fo:font-size="12pt" officeooo:rsid="0013dbb3" officeooo:paragraph-rsid="0013dbb3" style:font-size-asian="12pt" style:font-size-complex="12pt"/>
    </style:style>
    <style:style style:name="P4" style:family="paragraph" style:parent-style-name="Standard">
      <style:text-properties fo:color="#ff0000" loext:opacity="100%"/>
    </style:style>
    <style:style style:name="P5" style:family="paragraph" style:parent-style-name="Standard">
      <style:text-properties fo:color="#000000" loext:opacity="100%" fo:font-size="12pt" officeooo:rsid="0013dbb3" officeooo:paragraph-rsid="0013dbb3" style:font-size-asian="12pt" style:font-size-complex="12pt"/>
    </style:style>
    <style:style style:name="P6" style:family="paragraph" style:parent-style-name="Standard">
      <style:text-properties fo:color="#ff0000" loext:opacity="100%" fo:font-size="12pt" officeooo:rsid="0013dbb3" officeooo:paragraph-rsid="00140c3a" style:font-size-asian="12pt" style:font-size-complex="12pt"/>
    </style:style>
    <style:style style:name="P7" style:family="paragraph" style:parent-style-name="Standard">
      <style:text-properties fo:color="#000000" loext:opacity="100%" fo:font-size="12pt" officeooo:rsid="00140c3a" officeooo:paragraph-rsid="00140c3a" style:font-size-asian="12pt" style:font-size-complex="12pt"/>
    </style:style>
    <style:style style:name="T1" style:family="text">
      <style:text-properties fo:color="#ff0000" loext:opacity="100%"/>
    </style:style>
    <style:style style:name="T2"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ésentation du code :</text:p>
      <text:p text:style-name="P1"/>
      <text:p text:style-name="P2">package projet_java : cette ligne de code nous permet de savoir ou se trouve notre page ou le code est écrit.</text:p>
      <text:p text:style-name="P2"/>
      <text:p text:style-name="P3">import java.sql.*;</text:p>
      <text:p text:style-name="P4">import java.util.Scanner;</text:p>
      <text:p text:style-name="P4">import java.util.ArrayList;</text:p>
      <text:p text:style-name="P2">Ces trois lignes permettent d’importer différentes bibliothèques qui ne sont pas présentes par défaut.</text:p>
      <text:p text:style-name="P2">La premiere permet d’importer tout les éléments relatifs a la base de données</text:p>
      <text:p text:style-name="P2">La seconde permet d’importer les scanners qui vont permettre de récupérer des valeurs saisies par l’utilisateur.</text:p>
      <text:p text:style-name="P2">La dernière permet d’importer les array list qui sont les listes dans lesquelles on a stocké les valeurs pendant la suite du déroulement du programme.</text:p>
      <text:p text:style-name="P2"/>
      <text:p text:style-name="P2"><text:span text:style-name="T1">public class Main</text:span> : cette ligne permet d’indique que c’est a partir de ce moment la que nous pouvons commencer notre code. Le main est la classe principale d’un projet la où tout prend forme.</text:p>
      <text:p text:style-name="P2"/>
      <text:p text:style-name="P2"><text:span text:style-name="T1">String url = "jdbc:sqlite:BDD_pj_java.db.db" </text:span>: cette ligne est simplement la ligne du programme ou nous indiquons le chemin a suivre pour trouver notre base de donnée et donc la lier au projet.</text:p>
      <text:p text:style-name="P2"/>
      <text:p text:style-name="P2"><text:span text:style-name="T1">System.out.println("Bienvenue sur RecipEasy !");</text:span> <text:s/>la fonction println apparaît a plusieurs reprise dans notre code. Elle permet tout simplement d’afficher un message a l’utilisatuer dans la console.</text:p>
      <text:p text:style-name="P2"/>
      <text:p text:style-name="P2"><text:span text:style-name="T1">while (v1 &lt;= 50)</text:span> <text:s/>utilisations d’une boucle while (tant que ) qui permet de réaliser une action tant que la condition précisée entre parenthèse n’est pas terminée. Dans ce cas précis, cette boucle vérifie l’affichage de tout les aliments de notre base de données qui sont donc au nombre de 50.</text:p>
      <text:p text:style-name="P2"/>
      <text:p text:style-name="P2"><text:span text:style-name="T1">for (int x = 0; x &lt; nb_aliment; x++)</text:span> <text:s/>cette boucle for est un peu similaire au while mais elle s’execute cette fois ci un nombre de fois donnée en paramètre dans les parenthèses. <text:span text:style-name="T2">Ici , ctte boucle indique que tant que x est inferieur au nombre d’aliments voulu, alors la boucle continue.</text:span></text:p>
      <text:p text:style-name="P5"/>
      <text:p text:style-name="P5"/>
      <text:p text:style-name="P3"><text:s/>do {</text:p>
      <text:p text:style-name="P3"><text:tab/>System.out.print("\nCombien d'ingrédients souhaitez-vous utiliser ? (1 à 5) : ");</text:p>
      <text:p text:style-name="P3"/>
      <text:p text:style-name="P3"><text:tab/><text:tab/><text:tab/><text:tab/><text:tab/><text:tab/> <text:s text:c="15"/>if (sc.hasNextInt()) {</text:p>
      <text:p text:style-name="P3"><text:tab/><text:tab/><text:tab/><text:tab/><text:tab/><text:tab/> <text:s text:c="19"/>nb_aliment = sc.nextInt();</text:p>
      <text:p text:style-name="P3"><text:tab/><text:tab/><text:tab/><text:tab/><text:tab/><text:tab/> <text:s text:c="19"/>if (nb_aliment &lt; 1 || nb_aliment &gt; 5) System.out.println("⚠ Veuillez entrer un nombre entre 1 et 5.");</text:p>
      <text:p text:style-name="P3"><text:tab/><text:tab/><text:tab/><text:tab/><text:tab/><text:tab/> <text:s text:c="19"/>}</text:p>
      <text:p text:style-name="P6">} else</text:p>
      <text:p text:style-name="P6"><text:s text:c="2"/>System.out.println("⚠ Saisie invalide, veuillez entrer un nombre entier.");</text:p>
      <text:p text:style-name="P3"><text:tab/><text:tab/><text:tab/><text:tab/><text:tab/><text:tab/> <text:s text:c="19"/>sc.next(); // vider le token invalide</text:p>
      <text:p text:style-name="P3"><text:tab/><text:tab/><text:tab/><text:tab/><text:tab/><text:tab/> <text:s text:c="15"/>}</text:p>
      <text:p text:style-name="P3"/>
      <text:p text:style-name="P3">} while (nb_aliment &lt; 1 || nb_aliment &gt; 5);</text:p>
      <text:p text:style-name="P5"/>
      <text:p text:style-name="P7"><text:soft-page-break/>Cette boucle un peu complexe en regroupe en réalité deux : un do-while et un if-else. Le do wile est similaire au while mais cette fois ci la véification du while s’éffectue apres la boucle. Pour le if else, c’est un boucle qui execute une action si une condition est remplie et qui execute une autre action si cette condition n’est pas remplie. Dans cet exemple précis, on verifie que le nombre d’aliment entré par l’utilisateur est bien compris entre <text:s/>et <text:s/>et que ce n’est pas un caractère autre qu’un chiffre.</text:p>
      <text:p text:style-name="P7"/>
      <text:p text:style-name="P7"/>
      <text:p text:style-name="P7"><text:span text:style-name="T1">diff_ingre.add(id_aliment);</text:span> <text:s/>la fonction .add permet d’ajouter un aliment spécifique a notre arrayList.</text:p>
      <text:p text:style-name="P7"/>
      <text:p text:style-name="P7"><text:span text:style-name="T1">diff_ingre.size()</text:span> : cette commande .size permet de connaître la taille de notre arrayList et nous permet de coder en conséquences.</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7T21:50:45.166055800</meta:creation-date>
    <dc:date>2026-05-17T22:10:02.177391300</dc:date>
    <meta:editing-duration>PT6M54S</meta:editing-duration>
    <meta:editing-cycles>1</meta:editing-cycles>
    <meta:document-statistic meta:table-count="0" meta:image-count="0" meta:object-count="0" meta:page-count="2" meta:paragraph-count="28" meta:word-count="481" meta:character-count="3098" meta:non-whitespace-character-count="2487"/>
    <meta:generator>LibreOffice/25.8.5.2$Windows_X86_64 LibreOffice_project/9c8b85f387cc00a89945a79c9e6239f32e450ac2</meta:generator>
  </office:meta>
</office:document-meta>
</file>